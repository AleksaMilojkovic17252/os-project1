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A10000023481CAF403.png" manifest:media-type="image/png"/>
  <manifest:file-entry manifest:full-path="Pictures/10000001000004DD000002BFA63D6EA4.png" manifest:media-type="image/png"/>
  <manifest:file-entry manifest:full-path="Pictures/10000001000002EC000003BCB4A7558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F4000000E605706FA5.png" manifest:media-type="image/png"/>
  <manifest:file-entry manifest:full-path="Pictures/10000001000001F4000001CD6AD35F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4.5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7.12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2cm" draw:fill="none" draw:textarea-vertical-align="middle" loext:decorative="false"/>
    </style:style>
    <style:style style:name="gr7" style:family="graphic" style:parent-style-name="objectwithoutfill">
      <style:graphic-properties draw:marker-end="Arrowheads_20_2" draw:marker-end-width="0.2cm" draw:fill="none" draw:textarea-vertical-align="middle" loext:decorative="false"/>
    </style:style>
    <style:style style:name="gr8" style:family="graphic" style:parent-style-name="objectwithoutfill">
      <style:graphic-properties draw:marker-end="Arrowheads_20_3" draw:marker-end-width="0.2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2cm" draw:fill="none" draw:textarea-vertical-align="middle" loext:decorative="false"/>
    </style:style>
    <style:style style:name="gr10" style:family="graphic" style:parent-style-name="objectwithoutfill">
      <style:graphic-properties draw:marker-end="Arrowheads_20_5" draw:marker-end-width="0.2cm" draw:fill="none" draw:textarea-vertical-align="middle" loext:decorative="false"/>
    </style:style>
    <style:style style:name="gr11" style:family="graphic" style:parent-style-name="objectwithoutfill">
      <style:graphic-properties draw:marker-end="Arrowheads_20_6" draw:marker-end-width="0.2cm" draw:fill="none" draw:textarea-vertical-align="middle" loext:decorative="false"/>
    </style:style>
    <style:style style:name="gr12" style:family="graphic" style:parent-style-name="objectwithoutfill">
      <style:graphic-properties draw:marker-end="Arrowheads_20_7" draw:marker-end-width="0.2cm" draw:fill="none" draw:textarea-vertical-align="middle" loext:decorative="false"/>
    </style:style>
    <style:style style:name="gr13" style:family="graphic" style:parent-style-name="objectwithoutfill">
      <style:graphic-properties draw:marker-end="Arrowheads_20_8" draw:marker-end-width="0.2cm" draw:fill="none" draw:textarea-vertical-align="middle" loext:decorative="false"/>
    </style:style>
    <style:style style:name="gr14" style:family="graphic" style:parent-style-name="objectwithoutfill">
      <style:graphic-properties draw:marker-end="Arrowheads_20_9" draw:marker-end-width="0.2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2cm" draw:fill="none" draw:textarea-vertical-align="middle" loext:decorative="false"/>
    </style:style>
    <style:style style:name="gr16" style:family="graphic" style:parent-style-name="objectwithoutfill">
      <style:graphic-properties draw:marker-end="Arrowheads_20_11" draw:marker-end-width="0.2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loext:decorative="false"/>
      <style:paragraph-properties style:writing-mode="lr-tb"/>
    </style:style>
    <style:style style:name="gr18" style:family="graphic" style:parent-style-name="objectwithoutfill">
      <style:graphic-properties draw:marker-end="Arrowheads_20_12" draw:marker-end-width="0.2cm" draw:fill="none" draw:textarea-vertical-align="middl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title">
      <style:graphic-properties draw:textarea-horizontal-align="left" fo:min-height="3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1-title">
      <style:graphic-properties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0.1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Blue_5f_Curve1-title">
      <style:graphic-properties fo:min-height="3cm" loext:decorative="false"/>
      <style:paragraph-properties style:writing-mode="lr-tb"/>
    </style:style>
    <style:style style:name="co1" style:family="table-column">
      <style:table-column-properties style:column-width="9.286cm" style:use-optimal-column-width="false"/>
    </style:style>
    <style:style style:name="co2" style:family="table-column">
      <style:table-column-properties style:column-width="9.291cm" style:use-optimal-column-width="false"/>
    </style:style>
    <style:style style:name="co3" style:family="table-column">
      <style:table-column-properties style:column-width="13.204cm" style:use-optimal-column-width="false"/>
    </style:style>
    <style:style style:name="co4" style:family="table-column">
      <style:table-column-properties style:column-width="13.466cm" style:use-optimal-column-width="false"/>
    </style:style>
    <style:style style:name="ro1" style:family="table-row">
      <style:table-row-properties style:row-height="1.354cm" style:use-optimal-row-height="false"/>
    </style:style>
    <style:style style:name="ro2" style:family="table-row">
      <style:table-row-properties style:row-height="1.353cm" style:use-optimal-row-height="false"/>
    </style:style>
    <style:style style:name="ro3" style:family="table-row">
      <style:table-row-properties style:row-height="1.916cm" style:use-optimal-row-height="false"/>
    </style:style>
    <style:style style:name="ro4" style:family="table-row">
      <style:table-row-properties style:row-height="1.93cm" style:use-optimal-row-height="false"/>
    </style:style>
    <style:style style:name="P1" style:family="paragraph">
      <style:paragraph-properties fo:text-align="left"/>
    </style:style>
    <style:style style:name="P2" style:family="paragraph">
      <style:paragraph-properties fo:text-align="left"/>
      <style:text-properties fo:color="#eeeeee" loext:opacity="100%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3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color="#000000" loext:opacity="100%"/>
    </style:style>
    <style:style style:name="P10" style:family="paragraph">
      <style:text-properties fo:color="#000000" loext:opacity="100%"/>
    </style:style>
    <style:style style:name="T1" style:family="text">
      <style:text-properties fo:color="#eeeeee" loext:opacity="100%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loext:opacity="100%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Modifikacija I rebuild-ovanje Linux kernela</text:p>
          </draw:text-box>
        </draw:frame>
        <draw:frame presentation:style-name="pr2" draw:text-style-name="P2" draw:layer="layout" svg:width="25cm" svg:height="3cm" svg:x="0.4cm" svg:y="12.875cm" presentation:class="title" presentation:user-transformed="true">
          <draw:text-box>
            <text:p text:style-name="P1"><text:span text:style-name="T1">Aleksa Milojković 2100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Cilj projekta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item>
                <text:p>Proširiti linux kernel sa novo dodatim sistemskim pozivom I novim kernel modulom.</text:p>
              </text:list-item>
              <text:list-item>
                <text:p>Zadatak sistemskog poziva I kernel modula je da identifikuju procese koje procesa koriste neku datoteku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uildovanje Linux-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4">Preuzeti ubuntu disk, podignuti ubuntu preko virtualne masine</text:p>
              </text:list-item>
              <text:list-item>
                <text:p text:style-name="P4">Na ubuntu masini instalirati sledeće pakete</text:p>
                <text:list>
                  <text:list-item>
                    <text:p text:style-name="P5">sudo apt install build-essential libncurses-dev bison flex libssl-dev libelf-dev dwarves zstd</text:p>
                  </text:list-item>
                </text:list>
              </text:list-item>
              <text:list-item>
                <text:p>Skinuti linux kernel 6.12 sa kernel.or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uildovanje kernela</text:p>
          </draw:text-box>
        </draw:frame>
        <draw:frame presentation:style-name="pr7" draw:layer="layout" svg:width="26cm" svg:height="10cm" svg:x="1cm" svg:y="2.54cm" presentation:class="outline" presentation:user-transformed="true">
          <draw:text-box>
            <text:list text:style-name="L2">
              <text:list-item>
                <text:p>Od trenutnog Ubuntu config-a kopirati u skinut kernel I pokrenuti<text:tab/></text:p>
                <text:list>
                  <text:list-item>
                    <text:p>make olddefconfig</text:p>
                  </text:list-item>
                  <text:list-item>
                    <text:p>make localmodconfig – radi lakseg buildovanja</text:p>
                  </text:list-item>
                </text:list>
              </text:list-item>
              <text:list-item>
                <text:p>Ugasiti signing I buildovati 6.12 kernel</text:p>
                <text:list>
                  <text:list-item>
                    <text:p>scripts/config --disable SYSTEM_TRUSTED_KEYS</text:p>
                  </text:list-item>
                  <text:list-item>
                    <text:p>scripts/config --disable SYSTEM_REVOCATION_KEYS</text:p>
                  </text:list-item>
                  <text:list-item>
                    <text:p>make -j$(nproc)</text:p>
                  </text:list-item>
                  <text:list-item>
                    <text:p>make modules_instal</text:p>
                  </text:list-item>
                  <text:list-item>
                    <text:p>make install</text:p>
                  </text:list-item>
                  <text:list-item>
                    <text:p>reboo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Zašto Kernel module I sistemski poziv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serspace ne može da vidi tabele otvorenih fajl deskriptora drugih procesa</text:p>
              </text:list-item>
              <text:list-item>
                <text:p>Samo kod u kernelu može bezbedno da prolazi kroz listu procesa i fd tabele uz odgovarajuće zaključavanje 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draw:style-name="gr2" draw:text-style-name="P6" draw:layer="layout" svg:width="12.398cm" svg:height="11.431cm" svg:x="8.255cm" svg:y="1.905cm">
          <draw:image xlink:href="Pictures/10000001000001F4000001CD6AD35FB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Sistemski poziv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Ulazna tačka gde korisnički program traži uslugu od kernel-a</text:p>
              </text:list-item>
              <text:list-item>
                <text:p>Retko se dodaju novi jer zahteva postojanje specifičnog broja za novi sistemski poziv, koji se retko dodeljuje sem za česte funkcionalnosti.</text:p>
              </text:list-item>
            </text:list>
          </draw:text-box>
        </draw:frame>
        <draw:frame draw:style-name="gr2" draw:text-style-name="P6" draw:layer="layout" svg:width="13.228cm" svg:height="6.084cm" svg:x="12.065cm" svg:y="7.251cm">
          <draw:image xlink:href="Pictures/10000001000001F4000000E605706FA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Kernel modu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Deo koda koji se učitava u kernel ili sklanja iz kernela bez potrebe reestart-a sistema.</text:p>
              </text:list-item>
              <text:list-item>
                <text:p>Proširuje funkcionalnost sistema, najčešće drajvere uređaja, file sisteme, mrežne funkcije.</text:p>
              </text:list-item>
              <text:list-item>
                <text:p>Izvršava se direkno u kernel prostor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Sistemski Poziv vs Kernel Module</text:p>
          </draw:text-box>
        </draw:frame>
        <draw:frame draw:style-name="gr3" draw:layer="layout" svg:width="27.862cm" svg:height="10.829cm" svg:x="0.077cm" svg:y="1.9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Sistemski poziv</text:p>
              </table:table-cell>
              <table:table-cell>
                <text:p>Kernel module</text:p>
              </table:table-cell>
            </table:table-row>
            <table:table-row table:style-name="ro1" table:default-cell-style-name="bg-none">
              <table:table-cell>
                <text:p>Update</text:p>
              </table:table-cell>
              <table:table-cell>
                <text:p>Rekompajlirati kernel, restart</text:p>
              </table:table-cell>
              <table:table-cell>
                <text:p>Make + insmod</text:p>
              </table:table-cell>
            </table:table-row>
            <table:table-row table:style-name="ro1" table:default-cell-style-name="bg-none">
              <table:table-cell>
                <text:p>Pozvati</text:p>
              </table:table-cell>
              <table:table-cell>
                <text:p>Syscall(463, path, buf, n)</text:p>
              </table:table-cell>
              <table:table-cell>
                <text:p>Insmod mod.mo target=”path”</text:p>
              </table:table-cell>
            </table:table-row>
            <table:table-row table:style-name="ro1" table:default-cell-style-name="bg-none">
              <table:table-cell>
                <text:p>Output</text:p>
              </table:table-cell>
              <table:table-cell>
                <text:p>Copy_to_user()</text:p>
              </table:table-cell>
              <table:table-cell>
                <text:p>Pr_info() → dmesg</text:p>
              </table:table-cell>
            </table:table-row>
            <table:table-row table:style-name="ro1" table:default-cell-style-name="bg-none">
              <table:table-cell>
                <text:p>Dostupnost</text:p>
              </table:table-cell>
              <table:table-cell>
                <text:p>Stalno</text:p>
              </table:table-cell>
              <table:table-cell>
                <text:p>Prilikom učitavanja</text:p>
              </table:table-cell>
            </table:table-row>
            <table:table-row table:style-name="ro1" table:default-cell-style-name="bg-none">
              <table:table-cell>
                <text:p>Restrikcije</text:p>
              </table:table-cell>
              <table:table-cell>
                <text:p>nepostojaće</text:p>
              </table:table-cell>
              <table:table-cell>
                <text:p>EXPORT_SYMBOL</text:p>
              </table:table-cell>
            </table:table-row>
            <table:table-row table:style-name="ro2" table:default-cell-style-name="bg-none">
              <table:table-cell>
                <text:p>Napravljeno za</text:p>
              </table:table-cell>
              <table:table-cell>
                <text:p>Permanente funkcionalnosti OS</text:p>
              </table:table-cell>
              <table:table-cell>
                <text:p>Development funckionalnosti</text:p>
              </table:table-cell>
            </table:table-row>
            <table:table-row table:style-name="ro2" table:default-cell-style-name="bg-none">
              <table:table-cell>
                <text:p>Primer</text:p>
              </table:table-cell>
              <table:table-cell>
                <text:p>Open(), fork(), read()</text:p>
              </table:table-cell>
              <table:table-cell>
                <text:p>Drajver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Algoritam</text:p>
          </draw:text-box>
        </draw:frame>
        <draw:custom-shape draw:style-name="gr4" draw:text-style-name="P6" draw:layer="layout" svg:width="5.08cm" svg:height="1.905cm" svg:x="0.635cm" svg:y="3.81cm">
          <text:p text:style-name="P6">Prijem putanje</text:p>
          <text:p text:style-name="P6">fajla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905cm" svg:x="6.985cm" svg:y="3.81cm">
          <text:p text:style-name="P6">Pronaći I-node</text:p>
          <text:p text:style-name="P6">fajla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905cm" svg:x="13.335cm" svg:y="3.81cm">
          <text:p text:style-name="P6">Proći kroz svaki</text:p>
          <text:p text:style-name="P6">proce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905cm" svg:x="20.32cm" svg:y="3.81cm">
          <text:p text:style-name="P6">Za svaki proces,</text:p>
          <text:p text:style-name="P6">Proći FD-ov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62cm" svg:height="2.54cm" svg:x="17.145cm" svg:y="7.62cm">
          <text:p text:style-name="P6">Uporediti svaki FD inode</text:p>
          <text:p text:style-name="P6">Sa prosleđenim inode-o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905cm" svg:x="10.795cm" svg:y="8.255cm">
          <text:p text:style-name="P6">Pokupiti metrike</text:p>
          <text:p text:style-name="P6">Od task_struc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905cm" svg:x="3.81cm" svg:y="8.255cm">
          <text:p text:style-name="P6">Vratiti metrike </text:p>
          <text:p text:style-name="P6">ka userspace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5.715cm" svg:y1="5.08cm" svg:x2="6.985cm" svg:y2="5.08cm">
          <text:p/>
        </draw:line>
        <draw:line draw:style-name="gr7" draw:text-style-name="P7" draw:layer="layout" svg:x1="12.065cm" svg:y1="5.08cm" svg:x2="13.335cm" svg:y2="5.08cm">
          <text:p/>
        </draw:line>
        <draw:line draw:style-name="gr8" draw:text-style-name="P7" draw:layer="layout" svg:x1="18.415cm" svg:y1="5.08cm" svg:x2="20.32cm" svg:y2="5.08cm">
          <text:p/>
        </draw:line>
        <draw:line draw:style-name="gr9" draw:text-style-name="P7" draw:layer="layout" svg:x1="22.86cm" svg:y1="5.715cm" svg:x2="22.86cm" svg:y2="7.62cm">
          <text:p/>
        </draw:line>
        <draw:line draw:style-name="gr10" draw:text-style-name="P7" draw:layer="layout" svg:x1="17.145cm" svg:y1="9.525cm" svg:x2="15.875cm" svg:y2="9.525cm">
          <text:p/>
        </draw:line>
        <draw:line draw:style-name="gr11" draw:text-style-name="P7" draw:layer="layout" svg:x1="10.795cm" svg:y1="9.525cm" svg:x2="8.89cm" svg:y2="9.525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Struktura podataka task_struct</text:p>
          </draw:text-box>
        </draw:frame>
        <draw:custom-shape draw:style-name="gr4" draw:text-style-name="P6" draw:layer="layout" svg:width="5.08cm" svg:height="1.905cm" svg:x="0.635cm" svg:y="2.54cm">
          <text:p text:style-name="P6">task_struc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905cm" svg:x="6.985cm" svg:y="2.54cm">
          <text:p text:style-name="P6">files_struc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905cm" svg:x="13.97cm" svg:y="2.54cm">
          <text:p text:style-name="P6">fdtabl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905cm" svg:x="20.32cm" svg:y="5.715cm">
          <text:p text:style-name="P6">fil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905cm" svg:x="20.32cm" svg:y="2.541cm">
          <text:p text:style-name="P6">*fd[]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905cm" svg:x="13.97cm" svg:y="5.715cm">
          <text:p text:style-name="P6">inode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5.715cm" svg:y1="3.175cm" svg:x2="6.985cm" svg:y2="3.175cm">
          <text:p/>
        </draw:line>
        <draw:line draw:style-name="gr13" draw:text-style-name="P7" draw:layer="layout" svg:x1="12.065cm" svg:y1="3.175cm" svg:x2="13.97cm" svg:y2="3.175cm">
          <text:p/>
        </draw:line>
        <draw:line draw:style-name="gr14" draw:text-style-name="P7" draw:layer="layout" svg:x1="19.05cm" svg:y1="3.175cm" svg:x2="20.32cm" svg:y2="3.175cm">
          <text:p/>
        </draw:line>
        <draw:line draw:style-name="gr15" draw:text-style-name="P7" draw:layer="layout" svg:x1="22.225cm" svg:y1="4.446cm" svg:x2="22.225cm" svg:y2="5.715cm">
          <text:p/>
        </draw:line>
        <draw:line draw:style-name="gr16" draw:text-style-name="P7" draw:layer="layout" svg:x1="20.32cm" svg:y1="6.985cm" svg:x2="19.05cm" svg:y2="6.985cm">
          <text:p/>
        </draw:line>
        <draw:frame draw:style-name="gr17" draw:text-style-name="P8" draw:layer="layout" svg:width="5.08cm" svg:height="1.27cm" svg:x="13.97cm" svg:y="9.525cm">
          <draw:text-box>
            <text:p text:style-name="P6">Ovo se poredi</text:p>
          </draw:text-box>
        </draw:frame>
        <draw:line draw:style-name="gr18" draw:text-style-name="P7" draw:layer="layout" svg:x1="16.51cm" svg:y1="9.525cm" svg:x2="16.51cm" svg:y2="7.6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Sinhronizacija</text:p>
          </draw:text-box>
        </draw:frame>
        <draw:frame draw:style-name="gr3" draw:layer="layout" svg:width="26.669cm" svg:height="9.656cm" svg:x="0.741cm" svg:y="4.08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bg-none">
              <table:table-cell>
                <text:p><text:span text:style-name="T2">Problem</text:span></text:p>
              </table:table-cell>
              <table:table-cell>
                <text:p><text:span text:style-name="T2">Posledica</text:span></text:p>
              </table:table-cell>
            </table:table-row>
            <table:table-row table:style-name="ro4" table:default-cell-style-name="bg-none">
              <table:table-cell>
                <text:p>Proces se izvrši tokom pretrage procesa</text:p>
              </table:table-cell>
              <table:table-cell>
                <text:p>task_struct se oslobađa iz memorije→kernel panic, pristupamo memoriji koja je oslobođena</text:p>
              </table:table-cell>
            </table:table-row>
            <table:table-row table:style-name="ro4" table:default-cell-style-name="bg-none">
              <table:table-cell>
                <text:p>Proces pozove exec() tokom pretrage</text:p>
              </table:table-cell>
              <table:table-cell>
                <text:p>Task→files postaje NULL</text:p>
              </table:table-cell>
            </table:table-row>
            <table:table-row table:style-name="ro4" table:default-cell-style-name="bg-none">
              <table:table-cell>
                <text:p>Copy_to_user može da uspava proces</text:p>
              </table:table-cell>
              <table:table-cell>
                <text:p>Ne može tokom lock-a</text:p>
              </table:table-cell>
            </table:table-row>
            <table:table-row table:style-name="ro4" table:default-cell-style-name="bg-none">
              <table:table-cell>
                <text:p>kmalloc(GFP_KERNEL) može da uspava proces</text:p>
              </table:table-cell>
              <table:table-cell>
                <text:p>Ne može tokom lock-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Dobavljanje proces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4">Unutar RCU_READ_LOCK</text:p>
                <text:list>
                  <text:list-item>
                    <text:p text:style-name="P5">Iterirati kroz sve procese, zaključati proces, iterirati od svakog procesa njegov file descriptor, otključati proces, ako proces koristi traženi inode, pinovati ga get_task_struct, pointer stavi u niz ka procesu</text:p>
                  </text:list-item>
                </text:list>
              </text:list-item>
              <text:list-item>
                <text:p>Nakon</text:p>
                <text:list>
                  <text:list-item>
                    <text:p>Od pointer-a u nizu pročitati bitne podatke, memory descriptor preuzeti sa get_task_mm, prikazati rezult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Testiranje</text:p>
          </draw:text-box>
        </draw:frame>
        <draw:frame presentation:style-name="pr7" draw:layer="layout" svg:width="26cm" svg:height="10cm" svg:x="1.27cm" svg:y="3cm" presentation:class="outline" presentation:user-transformed="true">
          <draw:text-box>
            <text:list text:style-name="L2">
              <text:list-item>
                <text:p>Kreiran je spawn_openers.c program koji kreira određen broj procesa pod istom grupom, koji svi čitaju određen text fi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draw:style-name="gr2" draw:text-style-name="P6" draw:layer="layout" svg:width="12.322cm" svg:height="15.749cm" svg:x="8.255cm" svg:y="0cm">
          <draw:image xlink:href="Pictures/10000001000002EC000003BCB4A7558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Output syscall-a</text:p>
          </draw:text-box>
        </draw:frame>
        <draw:frame draw:style-name="gr2" draw:text-style-name="P6" draw:layer="layout" svg:width="20.358cm" svg:height="11.495cm" svg:x="3.772cm" svg:y="2.54cm">
          <draw:image xlink:href="Pictures/10000001000004DD000002BFA63D6EA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Output modula</text:p>
          </draw:text-box>
        </draw:frame>
        <draw:frame draw:style-name="gr2" draw:text-style-name="P6" draw:layer="layout" svg:width="27.999cm" svg:height="10.957cm" svg:x="0.032cm" svg:y="2.394cm">
          <draw:image xlink:href="Pictures/10000001000005A10000023481CAF4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5cm" svg:height="3.468cm" svg:x="1.67cm" svg:y="5.715cm" presentation:class="title" presentation:user-transformed="true">
          <draw:text-box>
            <text:p text:style-name="P9"><text:span text:style-name="T3">Hvala na pažnj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2T14:50:30.142173692</meta:creation-date>
    <dc:description>This work is licensed under a Creative Commons 0 License.
It makes use of the works of kka_libo_design@ashisuto.co.jp.</dc:description>
    <meta:generator>LibreOffice/26.2.4.2$Linux_X86_64 LibreOffice_project/df4f15f06f7b375c1d16aa35fba92d50b262cd01</meta:generator>
    <dc:title>Blue Curve</dc:title>
    <meta:editing-duration>PT9S</meta:editing-duration>
    <meta:editing-cycles>2</meta:editing-cycles>
    <dc:date>2026-07-02T17:46:18.614908495</dc:date>
    <meta:document-statistic meta:object-count="129"/>
  </office:meta>
</office:document-meta>
</file>